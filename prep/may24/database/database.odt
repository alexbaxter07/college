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`user_type` (</text:p>
      <text:p text:style-name="Standard"><text:s text:c="4"/>`user_type_id` BIGINT UNSIGNED NOT NULL AUTO_INCREMENT PRIMARY KEY,</text:p>
      <text:p text:style-name="Standard"><text:s text:c="4"/>`type` VARCHAR(50) NOT NULL,</text:p>
      <text:p text:style-name="Standard"><text:s text:c="4"/>`discount` DECIMAL(10,2) NOT NULL</text:p>
      <text:p text:style-name="Standard">);</text:p>
      <text:p text:style-name="Standard"/>
      <text:p text:style-name="Standard">CREATE TABLE `user` (</text:p>
      <text:p text:style-name="Standard"><text:s text:c="4"/>`user_id` BIGINT UNSIGNED NOT NULL AUTO_INCREMENT PRIMARY KEY,</text:p>
      <text:p text:style-name="Standard"><text:s text:c="4"/>`user_name` VARCHAR(255) NOT NULL,</text:p>
      <text:p text:style-name="Standard"><text:s text:c="4"/>`first_name` VARCHAR(255) NOT NULL,</text:p>
      <text:p text:style-name="Standard"><text:s text:c="4"/>`last_name` VARCHAR(255) NOT NULL,</text:p>
      <text:p text:style-name="Standard"><text:s text:c="4"/>`password` VARCHAR(255) NOT NULL,</text:p>
      <text:p text:style-name="Standard"><text:s text:c="4"/>`user_type_id` BIGINT UNSIGNED NOT NULL,</text:p>
      <text:p text:style-name="Standard"><text:s text:c="4"/>FOREIGN KEY (`user_type_id`) REFERENCES `user_type`(`user_type_id`) ON DELETE CASCADE</text:p>
      <text:p text:style-name="Standard">);</text:p>
      <text:p text:style-name="Standard"/>
      <text:p text:style-name="Standard">CREATE TABLE `hotel_room` (</text:p>
      <text:p text:style-name="Standard"><text:s text:c="4"/>`hr_id` BIGINT UNSIGNED NOT NULL AUTO_INCREMENT PRIMARY KEY,</text:p>
      <text:p text:style-name="Standard"><text:s text:c="4"/>`type` BIGINT UNSIGNED NOT NULL,</text:p>
      <text:p text:style-name="Standard"><text:s text:c="4"/>`occupancy` BIGINT NOT NULL,</text:p>
      <text:p text:style-name="Standard"><text:s text:c="4"/>`no_of_rooms` BIGINT NOT NULL,</text:p>
      <text:p text:style-name="Standard"><text:s text:c="4"/>`price` DECIMAL(10,2) NOT NULL</text:p>
      <text:p text:style-name="Standard">);</text:p>
      <text:p text:style-name="Standard"/>
      <text:p text:style-name="Standard">CREATE TABLE `tickets` (</text:p>
      <text:p text:style-name="Standard"><text:s text:c="4"/>`ticket_id` BIGINT UNSIGNED NOT NULL AUTO_INCREMENT PRIMARY KEY,</text:p>
      <text:p text:style-name="Standard"><text:s text:c="4"/>`type` VARCHAR(50) NOT NULL,</text:p>
      <text:p text:style-name="Standard"><text:s text:c="4"/>`price` DECIMAL(10,2) NOT NULL,</text:p>
      <text:p text:style-name="Standard"><text:s text:c="4"/>`no_of_tickets` BIGINT NOT NULL</text:p>
      <text:p text:style-name="Standard">);</text:p>
      <text:p text:style-name="Standard"/>
      <text:p text:style-name="Standard">CREATE TABLE `ticket_booking` (</text:p>
      <text:p text:style-name="Standard"><text:s text:c="4"/>`t_booking_id` BIGINT UNSIGNED NOT NULL AUTO_INCREMENT PRIMARY KEY,</text:p>
      <text:p text:style-name="Standard"><text:s text:c="4"/>`user_id` BIGINT UNSIGNED NOT NULL,</text:p>
      <text:p text:style-name="Standard"><text:s text:c="4"/>`booking_id` BIGINT UNSIGNED NOT NULL,</text:p>
      <text:p text:style-name="Standard"><text:s text:c="4"/>`made_on` DATETIME NOT NULL,</text:p>
      <text:p text:style-name="Standard"><text:s text:c="4"/>`date` DATETIME NOT NULL,</text:p>
      <text:p text:style-name="Standard"><text:s text:c="4"/>FOREIGN KEY (`user_id`) REFERENCES `user`(`user_id`) ON DELETE CASCADE</text:p>
      <text:p text:style-name="Standard">);</text:p>
      <text:p text:style-name="Standard"/>
      <text:p text:style-name="Standard">CREATE TABLE `hotel_booking` (</text:p>
      <text:p text:style-name="Standard"><text:s text:c="4"/>`hr_booking_id` BIGINT UNSIGNED NOT NULL AUTO_INCREMENT PRIMARY KEY,</text:p>
      <text:p text:style-name="Standard"><text:s text:c="4"/>`user_id` BIGINT UNSIGNED NOT NULL,</text:p>
      <text:p text:style-name="Standard"><text:s text:c="4"/>`made_on` DATETIME NOT NULL,</text:p>
      <text:p text:style-name="Standard"><text:s text:c="4"/>`date` DATETIME NOT NULL,</text:p>
      <text:p text:style-name="Standard"><text:s text:c="4"/>`nights` BIGINT NOT NULL,</text:p>
      <text:p text:style-name="Standard"><text:s text:c="4"/>`booking_id` BIGINT UNSIGNED NOT NULL,</text:p>
      <text:p text:style-name="Standard"><text:s text:c="4"/>`hr_id` BIGINT UNSIGNED NOT NULL,</text:p>
      <text:p text:style-name="Standard"><text:s text:c="4"/>FOREIGN KEY (`user_id`) REFERENCES `user`(`user_id`) ON DELETE CASCADE,</text:p>
      <text:p text:style-name="Standard"><text:s text:c="4"/>FOREIGN KEY (`hr_id`) REFERENCES `hotel_room`(`hr_id`) ON DELETE CASCADE</text:p>
      <text:p text:style-name="Standard">);</text:p>
      <text:p text:style-name="Standard"><text:soft-page-break/></text:p>
      <text:p text:style-name="Standard">CREATE TABLE `staying_in` (</text:p>
      <text:p text:style-name="Standard"><text:s text:c="4"/>`stay_id` BIGINT UNSIGNED NOT NULL AUTO_INCREMENT PRIMARY KEY,</text:p>
      <text:p text:style-name="Standard"><text:s text:c="4"/>`hr_booking_id` BIGINT UNSIGNED NOT NULL,</text:p>
      <text:p text:style-name="Standard"><text:s text:c="4"/>`hr_id` BIGINT UNSIGNED NOT NULL,</text:p>
      <text:p text:style-name="Standard"><text:s text:c="4"/>`no_of_people` BIGINT NOT NULL,</text:p>
      <text:p text:style-name="Standard"><text:s text:c="4"/>FOREIGN KEY (`hr_booking_id`) REFERENCES `hotel_booking`(`hr_booking_id`) ON DELETE CASCADE,</text:p>
      <text:p text:style-name="Standard"><text:s text:c="4"/>FOREIGN KEY (`hr_id`) REFERENCES `hotel_room`(`hr_id`) ON DELETE CASCADE</text:p>
      <text:p text:style-name="Standard">);</text:p>
      <text:p text:style-name="Standard"/>
      <text:p text:style-name="Standard">CREATE TABLE `visits` (</text:p>
      <text:p text:style-name="Standard"><text:s text:c="4"/>`visit_id` BIGINT UNSIGNED NOT NULL AUTO_INCREMENT PRIMARY KEY,</text:p>
      <text:p text:style-name="Standard"><text:s text:c="4"/>`t_booking_id` BIGINT UNSIGNED NOT NULL,</text:p>
      <text:p text:style-name="Standard"><text:s text:c="4"/>`ticket_id` BIGINT UNSIGNED NOT NULL,</text:p>
      <text:p text:style-name="Standard"><text:s text:c="4"/>`no_of_tickets` BIGINT NOT NULL,</text:p>
      <text:p text:style-name="Standard"><text:s text:c="4"/>FOREIGN KEY (`t_booking_id`) REFERENCES `ticket_booking`(`t_booking_id`) ON DELETE CASCADE,</text:p>
      <text:p text:style-name="Standard"><text:s text:c="4"/>FOREIGN KEY (`ticket_id`) REFERENCES `tickets`(`ticket_id`) ON DELETE CASCADE</text:p>
      <text:p text:style-name="Standard">);</text:p>
      <text:p text:style-name="Standard"/>
      <text:p text:style-name="Standard">CREATE TABLE `loyalty_transaction` (</text:p>
      <text:p text:style-name="Standard"><text:s text:c="4"/>`lt_id` BIGINT UNSIGNED NOT NULL AUTO_INCREMENT PRIMARY KEY,</text:p>
      <text:p text:style-name="Standard"><text:s text:c="4"/>`points` BIGINT NOT NULL,</text:p>
      <text:p text:style-name="Standard"><text:s text:c="4"/>`user_id` BIGINT UNSIGNED NOT NULL,</text:p>
      <text:p text:style-name="Standard"><text:s text:c="4"/>FOREIGN KEY (`user_id`) REFERENCES `user`(`user_id`) ON DELETE CASCADE</text:p>
      <text:p text:style-name="Standard">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27:10.313813406</meta:creation-date>
    <dc:date>2025-02-04T10:27:54.383385622</dc:date>
    <meta:editing-duration>PT46S</meta:editing-duration>
    <meta:editing-cycles>1</meta:editing-cycles>
    <meta:document-statistic meta:table-count="0" meta:image-count="0" meta:object-count="0" meta:page-count="2" meta:paragraph-count="68" meta:word-count="329" meta:character-count="2767" meta:non-whitespace-character-count="2306"/>
    <meta:generator>LibreOffice/24.8.3.2$Linux_X86_64 LibreOffice_project/e14c9fdd1f585efcbb2c5363087a99d20928d522</meta:generator>
  </office:meta>
</office:document-meta>
</file>